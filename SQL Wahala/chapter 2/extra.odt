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- 2.39: WHERE filters rows first, HAVING filters groups after aggregation.</text:p>
      <text:p text:style-name="Standard">-- 2.53: You cannot use a subquery here because grouping requires direct aggregation.</text:p>
      <text:p text:style-name="Standard">-- 2.54: Subqueries run inside another query; joins combine tables directly.</text:p>
      <text:p text:style-name="Standard">-- 2.55: Use LEFT JOIN to include all warehouses even if no invent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7:59:44.040511255</meta:creation-date>
    <dc:date>2026-05-30T18:06:48.552727500</dc:date>
    <meta:editing-duration>PT7M5S</meta:editing-duration>
    <meta:editing-cycles>1</meta:editing-cycles>
    <meta:document-statistic meta:table-count="0" meta:image-count="0" meta:object-count="0" meta:page-count="1" meta:paragraph-count="4" meta:word-count="48" meta:character-count="306" meta:non-whitespace-character-count="262"/>
    <meta:generator>LibreOffice/24.2.7.2$Linux_X86_64 LibreOffice_project/420$Build-2</meta:generator>
  </office:meta>
</office:document-meta>
</file>